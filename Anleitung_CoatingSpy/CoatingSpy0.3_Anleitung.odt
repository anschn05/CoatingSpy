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508000002B306475478.png" manifest:media-type="image/png"/>
  <manifest:file-entry manifest:full-path="Pictures/100000010000073D0000036C9DC7E9D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Title">
      <style:paragraph-properties>
        <style:tab-stops>
          <style:tab-stop style:position="7.909cm"/>
        </style:tab-stops>
      </style:paragraph-properties>
    </style:style>
    <style:style style:name="P2" style:family="paragraph" style:parent-style-name="Title">
      <style:text-properties fo:font-size="40pt" style:font-size-asian="40pt" style:font-size-complex="40pt"/>
    </style:style>
    <style:style style:name="P3" style:family="paragraph" style:parent-style-name="Subtitle">
      <style:text-properties officeooo:rsid="001c5f60" officeooo:paragraph-rsid="001c5f60"/>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Text_20_body">
      <style:text-properties officeooo:rsid="001c5f60" officeooo:paragraph-rsid="001c5f60"/>
    </style:style>
    <style:style style:name="P9" style:family="paragraph" style:parent-style-name="Heading_20_1">
      <style:paragraph-properties fo:break-before="page"/>
    </style:style>
    <style:style style:name="P10" style:family="paragraph" style:parent-style-name="Standard">
      <style:text-properties officeooo:rsid="000c84f1" officeooo:paragraph-rsid="001d7f47"/>
    </style:style>
    <style:style style:name="P11" style:family="paragraph" style:parent-style-name="Standard">
      <style:text-properties officeooo:rsid="000f107b" officeooo:paragraph-rsid="000f107b"/>
    </style:style>
    <style:style style:name="P12" style:family="paragraph" style:parent-style-name="Standard">
      <style:text-properties officeooo:rsid="000e0577" officeooo:paragraph-rsid="000e0577"/>
    </style:style>
    <style:style style:name="P13" style:family="paragraph" style:parent-style-name="Standard">
      <style:text-properties officeooo:rsid="000c84f1" officeooo:paragraph-rsid="000c84f1"/>
    </style:style>
    <style:style style:name="P14" style:family="paragraph" style:parent-style-name="Standard">
      <style:text-properties fo:font-weight="bold" officeooo:rsid="001f5623" officeooo:paragraph-rsid="001f5623" style:font-weight-asian="bold" style:font-weight-complex="bold"/>
    </style:style>
    <style:style style:name="P15" style:family="paragraph" style:parent-style-name="Standard">
      <style:text-properties officeooo:rsid="001f5623" officeooo:paragraph-rsid="001f5623"/>
    </style:style>
    <style:style style:name="P16" style:family="paragraph" style:parent-style-name="Heading_20_1" style:list-style-name=""/>
    <style:style style:name="P17" style:family="paragraph" style:parent-style-name="Standard">
      <style:text-properties officeooo:rsid="00104f42" officeooo:paragraph-rsid="001d7f47"/>
    </style:style>
    <style:style style:name="P18" style:family="paragraph" style:parent-style-name="Standard">
      <style:text-properties officeooo:rsid="0011d5ba" officeooo:paragraph-rsid="0011d5ba"/>
    </style:style>
    <style:style style:name="P19" style:family="paragraph" style:parent-style-name="Standard">
      <style:text-properties fo:font-weight="bold" officeooo:rsid="00104f42" officeooo:paragraph-rsid="00104f42" style:font-weight-asian="bold" style:font-weight-complex="bold"/>
    </style:style>
    <style:style style:name="P20" style:family="paragraph" style:parent-style-name="Standard">
      <style:text-properties officeooo:rsid="00104f42" officeooo:paragraph-rsid="00104f42"/>
    </style:style>
    <style:style style:name="P21" style:family="paragraph" style:parent-style-name="Standard">
      <style:text-properties officeooo:rsid="001d7f47" officeooo:paragraph-rsid="001d7f47"/>
    </style:style>
    <style:style style:name="P22" style:family="paragraph" style:parent-style-name="Standard">
      <style:paragraph-properties>
        <style:tab-stops>
          <style:tab-stop style:position="0.995cm"/>
          <style:tab-stop style:position="1.503cm"/>
        </style:tab-stops>
      </style:paragraph-properties>
      <style:text-properties officeooo:rsid="000c84f1" officeooo:paragraph-rsid="000c84f1"/>
    </style:style>
    <style:style style:name="P23" style:family="paragraph" style:parent-style-name="Text_20_body">
      <style:paragraph-properties>
        <style:tab-stops>
          <style:tab-stop style:position="0.995cm"/>
          <style:tab-stop style:position="1.503cm"/>
        </style:tab-stops>
      </style:paragraph-properties>
      <style:text-properties officeooo:rsid="000c84f1" officeooo:paragraph-rsid="000c84f1"/>
    </style:style>
    <style:style style:name="P24" style:family="paragraph" style:parent-style-name="Quotations">
      <style:paragraph-properties>
        <style:tab-stops>
          <style:tab-stop style:position="0.995cm"/>
          <style:tab-stop style:position="1.503cm"/>
        </style:tab-stops>
      </style:paragraph-properties>
      <style:text-properties officeooo:rsid="000c84f1"/>
    </style:style>
    <style:style style:name="P25" style:family="paragraph" style:parent-style-name="Text_20_body" style:list-style-name="L1">
      <style:paragraph-properties fo:margin-top="0cm" fo:margin-bottom="0cm" style:contextual-spacing="false"/>
      <style:text-properties officeooo:rsid="0011d5ba"/>
    </style:style>
    <style:style style:name="P26" style:family="paragraph" style:parent-style-name="Text_20_body" style:list-style-name="L1">
      <style:text-properties officeooo:rsid="0011d5ba"/>
    </style:style>
    <style:style style:name="P27" style:family="paragraph" style:parent-style-name="Standard">
      <style:text-properties officeooo:rsid="0011d5ba" officeooo:paragraph-rsid="001f5623"/>
    </style:style>
    <style:style style:name="P28" style:family="paragraph" style:parent-style-name="Heading_20_1">
      <style:paragraph-properties fo:break-before="page"/>
      <style:text-properties officeooo:rsid="001c5f60"/>
    </style:style>
    <style:style style:name="P29" style:family="paragraph" style:parent-style-name="Standard">
      <style:text-properties officeooo:rsid="0014b547" officeooo:paragraph-rsid="0014b547"/>
    </style:style>
    <style:style style:name="P30" style:family="paragraph" style:parent-style-name="Standard">
      <style:text-properties officeooo:rsid="00180bb4" officeooo:paragraph-rsid="00180bb4"/>
    </style:style>
    <style:style style:name="P31" style:family="paragraph" style:parent-style-name="Standard">
      <style:text-properties officeooo:rsid="001b0fa5" officeooo:paragraph-rsid="001b0fa5"/>
    </style:style>
    <style:style style:name="P32" style:family="paragraph" style:parent-style-name="Standard">
      <style:text-properties officeooo:rsid="001b0fa5" officeooo:paragraph-rsid="001c5f60"/>
    </style:style>
    <style:style style:name="P33" style:family="paragraph" style:parent-style-name="Standard">
      <style:text-properties fo:font-weight="bold" officeooo:rsid="001b0fa5" officeooo:paragraph-rsid="001c5f60" style:font-weight-asian="bold" style:font-weight-complex="bold"/>
    </style:style>
    <style:style style:name="P34" style:family="paragraph" style:parent-style-name="Standard">
      <style:text-properties officeooo:rsid="001c5f60" officeooo:paragraph-rsid="001c5f60"/>
    </style:style>
    <style:style style:name="P35" style:family="paragraph" style:parent-style-name="Standard">
      <style:text-properties officeooo:rsid="00193459" officeooo:paragraph-rsid="00180bb4"/>
    </style:style>
    <style:style style:name="P36" style:family="paragraph" style:parent-style-name="Standard">
      <style:text-properties officeooo:rsid="00193459" officeooo:paragraph-rsid="00193459"/>
    </style:style>
    <style:style style:name="P37" style:family="paragraph" style:parent-style-name="Standard">
      <style:text-properties officeooo:rsid="0014b547" officeooo:paragraph-rsid="001b0fa5"/>
    </style:style>
    <style:style style:name="P38" style:family="paragraph" style:parent-style-name="Standard">
      <style:paragraph-properties fo:break-before="page"/>
      <style:text-properties officeooo:rsid="0014b547" officeooo:paragraph-rsid="0014b547"/>
    </style:style>
    <style:style style:name="P39" style:family="paragraph" style:parent-style-name="Standard">
      <style:text-properties fo:font-weight="bold" officeooo:rsid="001c5f60" officeooo:paragraph-rsid="001c5f60" style:font-weight-asian="bold" style:font-weight-complex="bold"/>
    </style:style>
    <style:style style:name="P40" style:family="paragraph" style:parent-style-name="Standard">
      <style:text-properties officeooo:rsid="0015cdc2" officeooo:paragraph-rsid="0015cdc2"/>
    </style:style>
    <style:style style:name="P41" style:family="paragraph" style:parent-style-name="Standard">
      <style:text-properties officeooo:rsid="0014b547" officeooo:paragraph-rsid="0015cdc2"/>
    </style:style>
    <style:style style:name="P42" style:family="paragraph" style:parent-style-name="Standard">
      <style:text-properties fo:font-weight="bold" officeooo:rsid="0015cdc2" officeooo:paragraph-rsid="0015cdc2" style:font-weight-asian="bold" style:font-weight-complex="bold"/>
    </style:style>
    <style:style style:name="P43" style:family="paragraph" style:parent-style-name="Standard">
      <style:text-properties fo:font-style="italic" fo:font-weight="bold" officeooo:rsid="0016a7bf" officeooo:paragraph-rsid="0016a7bf" style:font-style-asian="italic" style:font-weight-asian="bold" style:font-style-complex="italic" style:font-weight-complex="bold"/>
    </style:style>
    <style:style style:name="P44" style:family="paragraph" style:parent-style-name="Standard">
      <style:text-properties officeooo:rsid="0016a7bf" officeooo:paragraph-rsid="0016a7bf"/>
    </style:style>
    <style:style style:name="T1" style:family="text">
      <style:text-properties officeooo:rsid="001d7f47"/>
    </style:style>
    <style:style style:name="T2" style:family="text">
      <style:text-properties officeooo:rsid="000e0577"/>
    </style:style>
    <style:style style:name="T3" style:family="text">
      <style:text-properties officeooo:rsid="000f107b"/>
    </style:style>
    <style:style style:name="T4" style:family="text">
      <style:text-properties officeooo:rsid="00104f42"/>
    </style:style>
    <style:style style:name="T5" style:family="text">
      <style:text-properties officeooo:rsid="001f5623"/>
    </style:style>
    <style:style style:name="T6" style:family="text">
      <style:text-properties officeooo:rsid="0011d5ba"/>
    </style:style>
    <style:style style:name="T7" style:family="text">
      <style:text-properties officeooo:rsid="00136f18"/>
    </style:style>
    <style:style style:name="T8" style:family="text">
      <style:text-properties officeooo:rsid="0014b547"/>
    </style:style>
    <style:style style:name="T9" style:family="text">
      <style:text-properties officeooo:rsid="000c84f1"/>
    </style:style>
    <style:style style:name="T10" style:family="text">
      <style:text-properties officeooo:rsid="002437a7"/>
    </style:style>
    <style:style style:name="T11" style:family="text">
      <style:text-properties officeooo:rsid="001c5f60"/>
    </style:style>
    <style:style style:name="T12" style:family="text">
      <style:text-properties officeooo:rsid="0015cdc2"/>
    </style:style>
    <style:style style:name="T13" style:family="text">
      <style:text-properties officeooo:rsid="0016a7bf"/>
    </style:style>
    <style:style style:name="T1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draw:frame draw:style-name="fr1" draw:name="Bild1 Kopie 1" text:anchor-type="char" svg:x="-0.175cm" svg:y="2.905cm" svg:width="17cm" svg:height="9.119cm" draw:z-index="2"><draw:image xlink:href="Pictures/1000000100000508000002B306475478.png" xlink:type="simple" xlink:show="embed" xlink:actuate="onLoad" draw:mime-type="image/png"/></draw:frame></text:p>
      <text:p text:style-name="Title"/>
      <text:p text:style-name="P2">CoatingSpy 0.3</text:p>
      <text:p text:style-name="P3">Anleitung</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Inhaltsverzeichnis</text:p>
          </text:index-title>
          <text:p text:style-name="P5"><text:a xlink:type="simple" xlink:href="#__RefHeading___Toc12_831998704" office:name="Beschreibung:" text:style-name="Index_20_Link" text:visited-style-name="Index_20_Link">Beschreibung:<text:tab/>3</text:a></text:p>
          <text:p text:style-name="P5"><text:a xlink:type="simple" xlink:href="#__RefHeading___Toc14_831998704" office:name="Montage:" text:style-name="Index_20_Link" text:visited-style-name="Index_20_Link">Montage:<text:tab/>3</text:a></text:p>
          <text:p text:style-name="P5"><text:a xlink:type="simple" xlink:href="#__RefHeading___Toc16_831998704" office:name="Installation/Einrichtung:" text:style-name="Index_20_Link" text:visited-style-name="Index_20_Link">Installation/Einrichtung:<text:tab/>4</text:a></text:p>
          <text:p text:style-name="P6"><text:a xlink:type="simple" xlink:href="#__RefHeading___Toc18_831998704" office:name="Verbindung über ein LAN-Kabel:" text:style-name="Index_20_Link" text:visited-style-name="Index_20_Link">Verbindung über ein LAN-Kabel:<text:tab/>4</text:a></text:p>
          <text:p text:style-name="P6"><text:a xlink:type="simple" xlink:href="#__RefHeading___Toc20_831998704" office:name="Verbindung über WLAN:" text:style-name="Index_20_Link" text:visited-style-name="Index_20_Link">Verbindung über WLAN:<text:tab/>4</text:a></text:p>
          <text:p text:style-name="P5"><text:a xlink:type="simple" xlink:href="#__RefHeading___Toc22_831998704" office:name="Konfiguration:" text:style-name="Index_20_Link" text:visited-style-name="Index_20_Link">Konfiguration:<text:tab/>5</text:a></text:p>
          <text:p text:style-name="P6"><text:a xlink:type="simple" xlink:href="#__RefHeading___Toc24_831998704" office:name="Webinterface:" text:style-name="Index_20_Link" text:visited-style-name="Index_20_Link">Webinterface:<text:tab/>5</text:a></text:p>
          <text:p text:style-name="P7"><text:a xlink:type="simple" xlink:href="#__RefHeading___Toc26_831998704" office:name="Einstellungen – Einstellen des Kamera-Sichtfeldes:" text:style-name="Index_20_Link" text:visited-style-name="Index_20_Link">Einstellungen – Einstellen des Kamera-Sichtfeldes:<text:tab/>5</text:a></text:p>
          <text:p text:style-name="P7"><text:a xlink:type="simple" xlink:href="#__RefHeading___Toc28_831998704" office:name="Cali – zum Calibrieren der Werte:" text:style-name="Index_20_Link" text:visited-style-name="Index_20_Link">Cali – zum Calibrieren der Werte:<text:tab/>6</text:a></text:p>
          <text:p text:style-name="P7"><text:a xlink:type="simple" xlink:href="#__RefHeading___Toc30_831998704" office:name="Recipes – Anlegen der Beschichtungstypen:" text:style-name="Index_20_Link" text:visited-style-name="Index_20_Link">Recipes – Anlegen der Beschichtungstypen:<text:tab/>6</text:a></text:p>
          <text:p text:style-name="P5"><text:a xlink:type="simple" xlink:href="#__RefHeading___Toc32_831998704" office:name="Detaillierte Erklärung des Webinterface:" text:style-name="Index_20_Link" text:visited-style-name="Index_20_Link">Detaillierte Erklärung des Webinterface:<text:tab/>7</text:a></text:p>
          <text:p text:style-name="P5"><text:a xlink:type="simple" xlink:href="#__RefHeading___Toc582_831998704" office:name="Signalleuchten auf der Seite des Sensors:" text:style-name="Index_20_Link" text:visited-style-name="Index_20_Link">Signalleuchten auf der Seite des Sensors:<text:tab/>7</text:a></text:p>
        </text:index-body>
      </text:table-of-content>
      <text:p text:style-name="P8"/>
      <text:h text:style-name="P9" text:outline-level="1"><text:bookmark-start text:name="__RefHeading___Toc12_831998704"/>Beschreibung<text:bookmark-end text:name="__RefHeading___Toc12_831998704"/></text:h>
      <text:p text:style-name="P10">Der CoatingSpy 0.3 <text:span text:style-name="T1">ist ein optischer Sensor zur automatischen Messung der Glasdicke und Erkennung von Beschichtungen auf Flaotglas. Der Sensor erkennt, ob eine Glasscheibe auf der Vorderseite, Rückseite, auf beiden Seiten oder gar nicht beschichtet ist. Zusätzlich können auch unterschiedliche Beschichtungstypen vom Sensor erkannt werden</text:span>.</text:p>
      <text:p text:style-name="P11">Der Sensor wird über <text:span text:style-name="T1">eine </text:span>LAN/WLAN-<text:span text:style-name="T1">Verbindung </text:span>mit einer IP-Adresse <text:span text:style-name="T1">k</text:span>alibriert, danach läuft der Sensor autonom und übergibt d<text:span text:style-name="T2">ie gemessenen Daten direkt mit digitalen bzw. analogen Signalen.</text:span></text:p>
      <text:p text:style-name="P12">Der <text:span text:style-name="T1">Sensor</text:span> <text:span text:style-name="T3">misst</text:span> Glasplatten bis zu einer Dicke von 25mm.</text:p>
      <text:p text:style-name="P13"><text:s/></text:p>
      <text:p text:style-name="P13"/>
      <text:h text:style-name="Heading_20_1" text:outline-level="1"><text:bookmark-start text:name="__RefHeading___Toc14_831998704"/>Montage<text:bookmark-end text:name="__RefHeading___Toc14_831998704"/></text:h>
      <text:p text:style-name="P12">Montieren Sie den <text:span text:style-name="T1">Sensor</text:span> parallel zur Durchlauflinie, orientieren Sie sich dabei an der oberen Kante</text:p>
      <text:p text:style-name="P12">Der Abstand zur Auflageebene sollte dabei 72mm betragen, messen Sie dafür von den unteren beiden Ecken, die gleichen Normalabstand zur oberen Kante haben, aus.</text:p>
      <text:p text:style-name="P12">Beachten Sie, dass direktes <text:span text:style-name="T3">bzw.</text:span> indirektes Licht <text:span text:style-name="T3">im Umfeld der Kameralinse sowie reflektierenden Gegenstände unter/hinter der Glasplatte </text:span>den Sensor beeinträchtigen können. <text:span text:style-name="T3">Sorgen Sie also für abgeschattete Lichtverhältnisse und einen passenden Hintergrund um optimale Ergebnisse zu erhalten.</text:span></text:p>
      <text:p text:style-name="P12"/>
      <text:p text:style-name="P11">Hier eine Grafik zur Hilfestellung: <text:span text:style-name="T4">(#</text:span><text:span text:style-name="T5">vielleicht nu </text:span><text:span text:style-name="T4">bissl modellieren, wenn ma scho a grafik eifügt)</text:span></text:p>
      <text:p text:style-name="P14"><draw:frame draw:style-name="fr1" draw:name="Bild1" text:anchor-type="char" svg:x="0cm" svg:y="0.064cm" svg:width="17cm" svg:height="9.119cm" draw:z-index="0"><draw:image xlink:href="Pictures/1000000100000508000002B306475478.png" xlink:type="simple" xlink:show="embed" xlink:actuate="onLoad" draw:mime-type="image/png"/></draw:frame></text:p>
      <text:p text:style-name="P14">Output-Kabel:</text:p>
      <text:p text:style-name="P15"/>
      <text:p text:style-name="P13"><text:tab/></text:p>
      <text:p text:style-name="P13"/>
      <text:h text:style-name="P16" text:outline-level="1"/>
      <text:h text:style-name="P9" text:outline-level="1"><text:bookmark-start text:name="__RefHeading___Toc16_831998704"/>Installation/Einrichtung<text:bookmark-end text:name="__RefHeading___Toc16_831998704"/></text:h>
      <text:p text:style-name="P17">Versorgen Sie nach <text:span text:style-name="T6">der </text:span>Montage den Sensor mit Strom. <text:span text:style-name="T7">Nun sollten Sie auf der Seite des Sensors, ein grünes Lämpchen leuchten sehen, </text:span><text:span text:style-name="T8">dieses bedeutet, dass der Sensor </text:span><text:span text:style-name="T1">betriebsbereit ist und nun Glasplatten erfassen.</text:span></text:p>
      <text:p text:style-name="P17"><text:span text:style-name="T6">Um diesen zur erstmaligen Anwendung zu kalibrieren, müssen Sie sich einmal über LAN oder WLAN damit verbinden</text:span> <text:span text:style-name="T6">und können anschließend über ein Webinterface die nötigen Einstellungen vornehmen.</text:span></text:p>
      <text:p text:style-name="P18">Hier eine detaillierte Anleitung <text:span text:style-name="T7">zum Verbinden mit dem Sensor:</text:span></text:p>
      <text:p text:style-name="P19"/>
      <text:h text:style-name="Heading_20_2" text:outline-level="2"><text:bookmark-start text:name="__RefHeading___Toc18_831998704"/>Verbindung über ein LAN-Kabel<text:bookmark-end text:name="__RefHeading___Toc18_831998704"/></text:h>
      <text:p text:style-name="P20">Um sich mit dem Webinterface des Sensors zu verbinden und diesen zu kalibrieren, müssen Sie zuerst ihre IP-Adresse einstellen. <text:span text:style-name="T6">Gehen Sie dafür wie folgt vor:</text:span></text:p>
      <text:p text:style-name="P21">1. Netzwerkverbindungen öffen: Windows-Taste+R, ‚ncpa.cpl’ eintippen</text:p>
      <text:p text:style-name="P21">2. LAN-Verbindung ‚CoatingSpy0.3‘ auswählen</text:p>
      <text:p text:style-name="P21">3. ‚Eigenschaften‘ → ‚<text:span text:style-name="T9">Internetprotokoll, Version 4 (TCP/IPv4)'</text:span></text:p>
      <text:p text:style-name="P21">4. ‚<text:span text:style-name="T9">Folgende IP-Adresse verwenden' </text:span>auswählen:</text:p>
      <text:p text:style-name="P22"><text:tab/><text:tab/>- IP-Adresse: 192.168.47.<text:span text:style-name="T1">xx</text:span> (<text:span text:style-name="T1">beliebige Zahl ungleich 10, </text:span><text:span text:style-name="T10">zB. 11</text:span>)</text:p>
      <text:p text:style-name="P22"><text:tab/><text:tab/>- Subnetzmaske: 255.255.255.0</text:p>
      <text:p text:style-name="P22"><text:tab/><text:tab/>- Standardgateway: leer</text:p>
      <text:p text:style-name="P23">Wichtig:</text:p>
      <text:p text:style-name="P24">Die IP-Adresse darf nicht 192.168.47.10 sein, da diese Adresse bereits vom Sensor verwendet wird.</text:p>
      <text:p text:style-name="P18">Sie sollten nun mit dem Sensor verbunden sein. Um das zu kontrollieren, können Sie im Command Prompt mit dem Befehl ‚ping 192.168.47.10‘, die Verbindung überprüfen.</text:p>
      <text:p text:style-name="P18"/>
      <text:h text:style-name="Heading_20_2" text:outline-level="2"><text:bookmark-start text:name="__RefHeading___Toc20_831998704"/>Verbindung über WLAN<text:bookmark-end text:name="__RefHeading___Toc20_831998704"/></text:h>
      <text:list text:style-name="L1">
        <text:list-item>
          <text:p text:style-name="P25">Mit dem WLAN-Netzwerk "CoatingSpy" verbinden. </text:p>
        </text:list-item>
        <text:list-item>
          <text:p text:style-name="P25">Passwort eingeben. </text:p>
        </text:list-item>
        <text:list-item>
          <text:p text:style-name="P25">Browser öffnen. </text:p>
        </text:list-item>
        <text:list-item>
          <text:p text:style-name="P26"><text:span text:style-name="Source_20_Text">http://192.168.47.10:8080/ui</text:span> aufrufen.</text:p>
        </text:list-item>
      </text:list>
      <text:p text:style-name="P27">(#<text:span text:style-name="T5">stimmt so? Keine ahnung</text:span>)</text:p>
      <text:h text:style-name="P28" text:outline-level="1"><text:bookmark-start text:name="__RefHeading___Toc22_831998704"/>Konfiguration<text:bookmark-end text:name="__RefHeading___Toc22_831998704"/></text:h>
      <text:p text:style-name="P18">Um nun den Sensor zu Calibrieren, öffnen Sie ihren Browser und geben Sie folgenden Link ein: <text:a xlink:type="simple" xlink:href="http://192.168.47.10:8080/ui/" text:style-name="Internet_20_link" text:visited-style-name="Visited_20_Internet_20_Link"><text:span text:style-name="T9">http://192.168.47.10:8080/ui/</text:span></text:a></text:p>
      <text:p text:style-name="P18"/>
      <text:p text:style-name="P15">Zur Kalibrierung wird eine unbeschichtete Floatglasscheibe benötigt. Für eine möglichst hohe Genauigkeit empfiehlt sich eine Glasdicke von 8 mm bis 12 mm, die Mindestdicke beträgt 4 mm.</text:p>
      <text:p text:style-name="P15"/>
      <text:h text:style-name="Heading_20_2" text:outline-level="2"><text:bookmark-start text:name="__RefHeading___Toc24_831998704"/>Webinterface<text:bookmark-end text:name="__RefHeading___Toc24_831998704"/></text:h>
      <text:p text:style-name="P29">Nun sollten Sie folgendes Webinterface vor sich haben:</text:p>
      <text:p text:style-name="P29"><draw:frame draw:style-name="fr1" draw:name="Bild2" text:anchor-type="char" svg:x="0cm" svg:y="0.222cm" svg:width="17cm" svg:height="8.036cm" draw:z-index="1"><draw:image xlink:href="Pictures/100000010000073D0000036C9DC7E9D4.png" xlink:type="simple" xlink:show="embed" xlink:actuate="onLoad" draw:mime-type="image/png"/></draw:frame></text:p>
      <text:p text:style-name="P29"/>
      <text:p text:style-name="P30">Rechts unten sehen Sie die Felder Recipes, Cali, +, - und ein Zahnrad, welches die Eistellungen meint.</text:p>
      <text:p text:style-name="P30"/>
      <text:h text:style-name="Heading_20_3" text:outline-level="3"><text:bookmark-start text:name="__RefHeading___Toc26_831998704"/>Einstellungen – <text:span text:style-name="T11">Einstellen des Kamera-Sichtfeldes</text:span><text:bookmark-end text:name="__RefHeading___Toc26_831998704"/></text:h>
      <text:p text:style-name="P31">In den Einstellungen, können Sie den Analysebereich bzw. das Sichtfeld der Kamera einstellen. <text:span text:style-name="T5">Der Ursprung des Koordinatensystems befindet sich links oben. </text:span></text:p>
      <text:p text:style-name="P31">Der angezeigte ‚Thickness-Factor‘, zeigt an, mit welchem Faktor der im Bereich ‚Histogram‘ berechnete Abstand der Maxima multipliziert wird, um auf die Dicke der Glasplatte zu kommen, ist aber fest gesetzt und somit für Sie irrelevant. Sollte die Dicke bei Ihnen nicht ganz stimmen, können Sie diese nach dem Schließen des Einstellungs-Fensters, rechts unten mit den Tasten ‚+‘ und ‚-‘ verstellen. Diese Einstellung wird für alle weiteren Messungen beibehalten, kann aber jederzeit, mit erneutem adjustieren angepasst werden.</text:p>
      <text:p text:style-name="P30"/>
      <text:p text:style-name="P32"/>
      <text:p text:style-name="P33">+/-:</text:p>
      <text:p text:style-name="P34">Hiermit können Sie, die obe mittig angezeigte der Dicke anpassen bzw. kalibrieren. Die Anpassung überträgt sich auch auf andere Plattendicken, muss also nicht für jede Dicke einzeln angepasst werden.</text:p>
      <text:p text:style-name="P32"/>
      <text:h text:style-name="Heading_20_3" text:outline-level="3"><text:bookmark-start text:name="__RefHeading___Toc28_831998704"/><text:soft-page-break/>Cali – zum Calibrieren der Werte<text:bookmark-end text:name="__RefHeading___Toc28_831998704"/></text:h>
      <text:p text:style-name="P34"/>
      <text:p text:style-name="P30"/>
      <text:p text:style-name="P30"/>
      <text:h text:style-name="Heading_20_3" text:outline-level="3"><text:bookmark-start text:name="__RefHeading___Toc30_831998704"/>Recipes – Anlegen der Beschichtungstypen<text:bookmark-end text:name="__RefHeading___Toc30_831998704"/></text:h>
      <text:p text:style-name="P35">In Recipes, zu Beginn noch leer, werden die Messdaten von verschiedenen Beschichtungsarten gespeichert, damit sie nachher vom Sensor erkannt werden können. Diese müssen Sie bei der Kalibrierung speichern.</text:p>
      <text:p text:style-name="P36">Legen Sie dafür eine beliebige Glasscheibe unter den Sensor und kontrollieren Sie ob Sie für alle 5 Laser Werte erhalten. Wenn ja, klicken Sie unten auf ‚Recipes’ und im nun aufgetauchten Fenster unten rechts auf ‚Add‘. <text:span text:style-name="T5">Geben Sie eine eindeutige </text:span>Glass-ID ein, einen Glass-namen, zum Beispeil (unten beschichtete, beidseitig beschichtet oder sogar noch spezifischere Namen) und wählen darunter die entsprechende Beschichtungsart der Glasscheibe aus. Außerdem können sie noch auswählen, welche Laser er dabei beachten soll.</text:p>
      <text:p text:style-name="P36">Klicken Sie zum Schluss auf ‚Add to List‘.</text:p>
      <text:p text:style-name="P36">Wenn Sie noch weitere Glasscheiben-Beschichtungen speichern wollen, können Sie das erneut durch das einlegen einer neuen Scheibe und dem Klicken des ‚Add‘-Feldes tun. Wenn Sie ein Rezept löschen wollen, klicken Sie in der Rezeptesammlung auf das zu <text:span text:style-name="T5">l</text:span>öschende Rezept und anschließend unten rechts auf ‚Delete‘.</text:p>
      <text:p text:style-name="P36">Speichern Sie am Ende alle Ihre Änderungen mit ‚Save‘.</text:p>
      <text:p text:style-name="P31">Bei jeder nachträglich eingescannten Scheibe vergleicht das Programm nun die Messdaten mit den Daten der verschiedenen Rezepte und gibt das mit den Daten am ehesten übereinstimmende als Ergebnis aus, scannen Sie also wirklich für jede bei Ihnen vorkommende Beschichtungsart zur Kalibrierung eine Glasscheibe.</text:p>
      <text:p text:style-name="P37"/>
      <text:p text:style-name="P37"/>
      <text:p text:style-name="P34">Wenn Sie alle Ihre Beschichtungstypen gespeichert haben und die Glasdicke angepasst, sind Sie mit der Kalibrierung fertig und der Sensor ist einsatzbereit, Sie können nun die Verbindung zwischen Ihrem Laptop und dem <text:span text:style-name="T1">Sensor</text:span> beenden.</text:p>
      <text:p text:style-name="P38"/>
      <text:h text:style-name="Heading_20_1" text:outline-level="1"><text:bookmark-start text:name="__RefHeading___Toc32_831998704"/>Detaillierte Erklärung des Webinterface<text:bookmark-end text:name="__RefHeading___Toc32_831998704"/></text:h>
      <text:p text:style-name="P29"/>
      <text:p text:style-name="P39">oberste Zeile:</text:p>
      <text:p text:style-name="P40">In der ganz oberen Zeile, ist nach Kalibrierung, beim Einlegen einer Scheibe, <text:span text:style-name="T11">die Glass-ID, </text:span>der erkannte Beschichtungstyp <text:span text:style-name="T11">und die Dicke der Glasplatte</text:span> abzulesen.</text:p>
      <text:p text:style-name="P40"/>
      <text:p text:style-name="P41">Der Bereich <text:span text:style-name="T12">darunter</text:span> ist in zwei Bereiche gegliedert:</text:p>
      <text:p text:style-name="P42">Live-Image:</text:p>
      <text:p text:style-name="P41"><text:span text:style-name="T12">Zeigt </text:span>die Aufnahmen der Kamera <text:span text:style-name="T12">an</text:span>, <text:span text:style-name="T12">wobei die Anzeige abhängig von der Belichtungszeit</text:span>wobei <text:span text:style-name="T12">oben rechts angepasst werden kann. Bei Test sollten Sie eine klassische Schwarz-Weiß-Aufnahme sehen, sonst bis zu 10 Punkte, mit verschiedenen Lichtintensitäten.</text:span></text:p>
      <text:p text:style-name="P40">Test: </text:p>
      <text:p text:style-name="P40">Dark:</text:p>
      <text:p text:style-name="P40">Medium:</text:p>
      <text:p text:style-name="P40">Bright: </text:p>
      <text:p text:style-name="P42">Histogram:</text:p>
      <text:p text:style-name="P40">Bildet die Intensität der 5 Laserreflexionen in x-Richtung mithilfe von Graphen ab.</text:p>
      <text:p text:style-name="P40">Damit wird die Dicke der Glasplatte berechnet und analysiert, wo sich <text:span text:style-name="T13">eine mögliche </text:span>Beschichtung befindet. Das geschieht mit der Berechnung des Verhältnisses der Lichtstärke der vorderen und hinteren Reflexion.</text:p>
      <text:p text:style-name="P40">Mit verschiedenen Auswahlmöglichkeiten rechts oben, können Sie sich auch nur die Ergebnisse eines Lasers ansehen.</text:p>
      <text:p text:style-name="P43">Ratios:</text:p>
      <text:p text:style-name="P44">Berechnet je Laserfarbe mit den zwei Lichtsstärken-Maxima, des darüber dargestellten Graphen, das Verhältnis der beiden Werte und gibt diese einmal linear aus und einmal nach Anwendung des Logarithmus (wenn die vordere Reflexion stärker ist, ist das lineare Ergebnis somit größer eins, wodurch der Wert des Logarithmus positiv ist, wenn die hintere Reflexion stärker ist, ist das lineare Ergebnis kleiner eins und der Wert des Logarithmus somit negativ)</text:p>
      <text:p text:style-name="P43">Blobs:</text:p>
      <text:p text:style-name="P44">Zeigt je Laserfarbe ein oder zwei Zeilen an. Die Buchstaben </text:p>
      <text:p text:style-name="P43">Peaks:</text:p>
      <text:p text:style-name="P40"/>
      <text:p text:style-name="P13"/>
      <text:h text:style-name="Heading_20_1" text:outline-level="1"><text:bookmark-start text:name="__RefHeading___Toc582_831998704"/>Signalleuchten auf der Seite des Sensors<text:bookmark-end text:name="__RefHeading___Toc582_831998704"/></text:h>
      <text:p text:style-name="P15"><text:span text:style-name="T14">Grün</text:span> – Sensor ist betriebsbereit</text:p>
      <text:p text:style-name="P15"><text:span text:style-name="T14">Blau</text:span> – Sensor erkennt eine Glasscheibe</text:p>
      <text:p text:style-name="P15"><text:span text:style-name="T14">Gelb</text:span> – die Glasscheibe ist oben/vorne beschichtet</text:p>
      <text:p text:style-name="P15"><text:span text:style-name="T14">Weiß</text:span> – die Glasscheibe ist unten/hinten beschichtet</text:p>
      <text:p text:style-name="P13"/>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AT"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8T11:46:44.847664200</meta:creation-date>
    <dc:date>2026-06-24T12:48:22.686925800</dc:date>
    <meta:editing-duration>PT6H8M34S</meta:editing-duration>
    <meta:editing-cycles>3</meta:editing-cycles>
    <meta:generator>LibreOffice/25.8.7.1$Windows_X86_64 LibreOffice_project/39c3b7ac021cfb9f4ca681457ad36828f90e2ce7</meta:generator>
    <meta:document-statistic meta:table-count="0" meta:image-count="3" meta:object-count="0" meta:page-count="7" meta:paragraph-count="93" meta:word-count="1116" meta:character-count="7999" meta:non-whitespace-character-count="6953"/>
  </office:meta>
</office:document-meta>
</file>