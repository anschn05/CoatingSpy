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3D0000036C9DC7E9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8230d" officeooo:paragraph-rsid="0018230d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18230d" officeooo:paragraph-rsid="0018230d"/>
    </style:style>
    <style:style style:name="P3" style:family="paragraph" style:parent-style-name="Standard">
      <style:text-properties fo:font-size="9pt" officeooo:paragraph-rsid="0018230d" style:font-size-asian="9pt" style:font-size-complex="9pt"/>
    </style:style>
    <style:style style:name="P4" style:family="paragraph" style:parent-style-name="Standard">
      <style:text-properties fo:font-size="9pt" officeooo:rsid="00104f42" officeooo:paragraph-rsid="0018230d" style:font-size-asian="9pt" style:font-size-complex="9pt"/>
    </style:style>
    <style:style style:name="P5" style:family="paragraph" style:parent-style-name="Heading_20_2" style:list-style-name="L1" style:master-page-name="">
      <loext:graphic-properties draw:fill="none"/>
      <style:paragraph-properties fo:margin-left="0.499cm" fo:margin-right="0cm" fo:margin-top="0.353cm" fo:margin-bottom="0.212cm" style:contextual-spacing="false" fo:text-indent="-0.6cm" style:auto-text-indent="false" style:page-number="auto" fo:background-color="transparent" fo:keep-with-next="always">
        <style:tab-stops>
          <style:tab-stop style:position="0.513cm"/>
        </style:tab-stops>
      </style:paragraph-properties>
      <style:text-properties fo:font-size="9pt" officeooo:paragraph-rsid="0018230d" style:font-size-asian="9pt" style:font-size-complex="9pt"/>
    </style:style>
    <style:style style:name="P6" style:family="paragraph" style:parent-style-name="Standard" style:list-style-name="L2">
      <style:text-properties fo:font-size="9pt" officeooo:rsid="001d7f47" officeooo:paragraph-rsid="0018230d" style:font-size-asian="9pt" style:font-size-complex="9pt"/>
    </style:style>
    <style:style style:name="P7" style:family="paragraph" style:parent-style-name="Standard" style:list-style-name="L2">
      <style:text-properties fo:font-size="9pt" officeooo:rsid="001d7f47" officeooo:paragraph-rsid="0022a59e" style:font-size-asian="9pt" style:font-size-complex="9pt"/>
    </style:style>
    <style:style style:name="P8" style:family="paragraph" style:parent-style-name="Standard" style:list-style-name="L3">
      <style:text-properties fo:font-size="9pt" officeooo:rsid="001d7f47" officeooo:paragraph-rsid="0022a59e" style:font-size-asian="9pt" style:font-size-complex="9pt"/>
    </style:style>
    <style:style style:name="P9" style:family="paragraph" style:parent-style-name="Standard" style:list-style-name="L3">
      <style:paragraph-properties>
        <style:tab-stops>
          <style:tab-stop style:position="0.995cm"/>
          <style:tab-stop style:position="1.503cm"/>
        </style:tab-stops>
      </style:paragraph-properties>
      <style:text-properties fo:font-size="9pt" officeooo:rsid="000c84f1" officeooo:paragraph-rsid="0022a59e" style:font-size-asian="9pt" style:font-size-complex="9pt"/>
    </style:style>
    <style:style style:name="P10" style:family="paragraph" style:parent-style-name="Standard" style:list-style-name="L2">
      <style:text-properties fo:font-size="9pt" officeooo:rsid="0022a59e" officeooo:paragraph-rsid="0022a59e" style:font-size-asian="9pt" style:font-size-complex="9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18230d" style:font-size-asian="9pt" style:font-size-complex="9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22a59e" style:font-size-asian="9pt" style:font-size-complex="9pt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1c0c4f" style:font-size-asian="9pt" style:font-size-complex="9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Liberation Sans" fo:font-size="12pt" fo:font-weight="bold" officeooo:rsid="0011d5ba" officeooo:paragraph-rsid="001c0c4f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fo:font-size="9pt" fo:font-weight="normal" officeooo:rsid="0022a59e" officeooo:paragraph-rsid="0018230d" style:font-size-asian="9pt" style:font-weight-asian="normal" style:font-size-complex="9pt" style:font-weight-complex="normal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fo:font-size="9pt" officeooo:rsid="0018230d" officeooo:paragraph-rsid="0018230d" style:font-size-asian="9pt" style:font-size-complex="9pt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fo:font-size="9pt" officeooo:rsid="0022a59e" officeooo:paragraph-rsid="0022a59e" style:font-size-asian="9pt" style:font-size-complex="9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ans" fo:font-size="8pt" fo:font-weight="bold" officeooo:rsid="00232505" officeooo:paragraph-rsid="001c0c4f" style:font-name-asian="Microsoft YaHei" style:font-size-asian="7pt" style:font-weight-asian="bold" style:font-name-complex="Arial1" style:font-size-complex="8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size="9pt" officeooo:rsid="0018230d" officeooo:paragraph-rsid="0023eb2e" style:font-size-asian="9pt" style:font-size-complex="9pt"/>
    </style:style>
    <style:style style:name="P20" style:family="paragraph" style:parent-style-name="Text_20_body">
      <style:paragraph-properties fo:margin-top="0cm" fo:margin-bottom="0cm" style:contextual-spacing="false"/>
      <style:text-properties fo:font-size="9pt" officeooo:rsid="0023eb2e" officeooo:paragraph-rsid="0023eb2e" style:font-size-asian="9pt" style:font-size-complex="9pt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fo:font-size="9pt" officeooo:rsid="0018230d" officeooo:paragraph-rsid="0018230d" style:font-size-asian="9pt" style:font-size-complex="9pt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fo:font-size="9pt" officeooo:rsid="00252945" officeooo:paragraph-rsid="00252945" style:font-size-asian="9pt" style:font-size-complex="9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fo:font-size="9pt" officeooo:rsid="001a11f9" officeooo:paragraph-rsid="001a11f9" style:font-size-asian="9pt" style:font-size-complex="9pt"/>
    </style:style>
    <style:style style:name="P24" style:family="paragraph" style:parent-style-name="Text_20_body" style:list-style-name="L6">
      <style:paragraph-properties fo:margin-top="0cm" fo:margin-bottom="0cm" style:contextual-spacing="false"/>
      <style:text-properties fo:font-size="9pt" officeooo:rsid="0023eb2e" officeooo:paragraph-rsid="0023eb2e" style:font-size-asian="9pt" style:font-size-complex="9pt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fo:font-size="9pt" officeooo:rsid="001a11f9" officeooo:paragraph-rsid="0023eb2e" style:font-size-asian="9pt" style:font-size-complex="9pt"/>
    </style:style>
    <style:style style:name="P26" style:family="paragraph" style:parent-style-name="Text_20_body">
      <style:paragraph-properties fo:margin-top="0cm" fo:margin-bottom="0cm" style:contextual-spacing="false"/>
      <style:text-properties fo:font-size="9pt" officeooo:rsid="00252945" officeooo:paragraph-rsid="00252945" style:font-size-asian="9pt" style:font-size-complex="9pt"/>
    </style:style>
    <style:style style:name="T1" style:family="text">
      <style:text-properties officeooo:rsid="00104f42"/>
    </style:style>
    <style:style style:name="T2" style:family="text">
      <style:text-properties officeooo:rsid="001fbcfe"/>
    </style:style>
    <style:style style:name="T3" style:family="text">
      <style:text-properties officeooo:rsid="0018230d"/>
    </style:style>
    <style:style style:name="T4" style:family="text">
      <style:text-properties officeooo:rsid="0025e9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c84f1"/>
    </style:style>
    <style:style style:name="T7" style:family="text">
      <style:text-properties fo:font-weight="normal" officeooo:rsid="0018230d" style:font-weight-asian="normal" style:font-weight-complex="normal"/>
    </style:style>
    <style:style style:name="T8" style:family="text">
      <style:text-properties fo:font-weight="normal" officeooo:rsid="000c84f1" style:font-weight-asian="normal" style:font-weight-complex="normal"/>
    </style:style>
    <style:style style:name="T9" style:family="text">
      <style:text-properties officeooo:rsid="002100fd"/>
    </style:style>
    <style:style style:name="T10" style:family="text">
      <style:text-properties fo:font-style="italic" officeooo:rsid="001fbcfe" style:font-style-asian="italic" style:font-style-complex="italic"/>
    </style:style>
    <style:style style:name="T11" style:family="text">
      <style:text-properties officeooo:rsid="0022a59e"/>
    </style:style>
    <style:style style:name="T12" style:family="text">
      <style:text-properties fo:font-weight="normal" officeooo:rsid="0022a59e" style:font-weight-asian="normal" style:font-weight-complex="normal"/>
    </style:style>
    <style:style style:name="T13" style:family="text">
      <style:text-properties officeooo:rsid="0023eb2e"/>
    </style:style>
    <style:style style:name="T14" style:family="text">
      <style:text-properties officeooo:rsid="0027df42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rze Anleitung</text:p>
      <text:p text:style-name="P2"/>
      <text:p text:style-name="P3"><text:span text:style-name="T1">Sensor mit </text:span><text:span text:style-name="T2">Daten- bzw. Versorgungskabel (8-polig)</text:span><text:span text:style-name="T1"> verbinden.</text:span><text:span text:style-name="T3"> Nach </text:span><text:span text:style-name="T2">ca. </text:span><text:span text:style-name="T4">20</text:span><text:span text:style-name="T2"> Sekunden signalisiert das grüne Status-LED den betriebsbereiten Zustand.</text:span></text:p>
      <text:p text:style-name="P4">Um sich mit dem Webinterface des Sensors zu verbinden <text:span text:style-name="T2">und</text:span> diesen zu kalibrieren, <text:span text:style-name="T3">haben Sie zwei Möglichkeiten:</text:span></text:p>
      <text:list xml:id="list1800700222" text:style-name="L1">
        <text:list-item>
          <text:list>
            <text:list-item>
              <text:h text:style-name="P5" text:outline-level="2"><text:bookmark-start text:name="__RefHeading___Toc18_831998704"/>Verbindung über LAN-Kabel<text:bookmark-end text:name="__RefHeading___Toc18_831998704"/></text:h>
            </text:list-item>
          </text:list>
        </text:list-item>
      </text:list>
      <text:list xml:id="list2101157178" text:style-name="L2">
        <text:list-item>
          <text:p text:style-name="P6">Netzwerkverbindungen öffen<text:span text:style-name="T2"> über „</text:span><text:span text:style-name="T5">Windows-Taste+R, ‚ncpa.cpl’ eintippen</text:span>“</text:p>
        </text:list-item>
        <text:list-item>
          <text:p text:style-name="P6"><text:span text:style-name="T2">Netzwerkkabel anstecken und die dadurch neu aktiv-gewordene </text:span>LAN-Verbindung auswählen</text:p>
        </text:list-item>
        <text:list-item>
          <text:p text:style-name="P6">‚Eigenschaften‘ → ‚<text:span text:style-name="T6">Internetprotokoll, Version 4 (TCP/IPv4)'</text:span></text:p>
        </text:list-item>
        <text:list-item>
          <text:p text:style-name="P7">‚<text:span text:style-name="T6">Folgende IP-Adresse verwenden' </text:span>auswählen:</text:p>
        </text:list-item>
      </text:list>
      <text:list text:style-name="L3">
        <text:list-item>
          <text:list>
            <text:list-item>
              <text:p text:style-name="P8"><text:span text:style-name="T6">IP-Adresse: 192.168.47.</text:span><text:span text:style-name="T2">11</text:span></text:p>
            </text:list-item>
            <text:list-item>
              <text:p text:style-name="P9">Subnetzmaske: 255.255.255.0</text:p>
            </text:list-item>
            <text:list-item>
              <text:p text:style-name="P9">Standardgateway: leer</text:p>
            </text:list-item>
          </text:list>
        </text:list-item>
      </text:list>
      <text:list text:continue-list="list2101157178" text:style-name="L2">
        <text:list-item>
          <text:p text:style-name="P10">Im Browser öffnen<text:span text:style-name="T7">: </text:span><text:a xlink:type="simple" xlink:href="http://192.168.47.10:8080/ui/" text:style-name="Internet_20_link" text:visited-style-name="Visited_20_Internet_20_Link"><text:span text:style-name="T8">http://192.168.47.10:8080</text:span></text:a></text:p>
        </text:list-item>
      </text:list>
      <text:list text:continue-list="list1800700222" text:style-name="L1">
        <text:list-item>
          <text:list>
            <text:list-item>
              <text:h text:style-name="P5" text:outline-level="2"><text:bookmark-start text:name="__RefHeading___Toc20_831998704"/>Verbindung über WLAN<text:bookmark-end text:name="__RefHeading___Toc20_831998704"/></text:h>
            </text:list-item>
          </text:list>
        </text:list-item>
      </text:list>
      <text:list text:style-name="L4">
        <text:list-item>
          <text:p text:style-name="P11">Mit dem WLAN-Netzwerk "CoatingSpy-<text:span text:style-name="T9">######</text:span><text:span text:style-name="T2">-</text:span><text:span text:style-name="T9">##</text:span>" verbinden. </text:p>
        </text:list-item>
        <text:list-item>
          <text:p text:style-name="P12">Passwort <text:span text:style-name="T5">‚</text:span><text:span text:style-name="T10">CoatingSpy123‘ </text:span>eingeben.</text:p>
        </text:list-item>
        <text:list-item>
          <text:p text:style-name="P12"><text:span text:style-name="T11">Im Browser öffnen: </text:span><text:a xlink:type="simple" xlink:href="http://192.168.47.10:8080/ui/" text:style-name="Internet_20_link" text:visited-style-name="Visited_20_Internet_20_Link"><text:span text:style-name="T8">http://192.168.</text:span><text:span text:style-name="T12">100</text:span><text:span text:style-name="T8">.</text:span><text:span text:style-name="T12">1</text:span><text:span text:style-name="T8">:8080</text:span></text:a> </text:p>
          <text:p text:style-name="P13"/>
        </text:list-item>
      </text:list>
      <text:p text:style-name="P14"><draw:frame draw:style-name="fr1" draw:name="Bild2" text:anchor-type="char" svg:x="-0.402cm" svg:y="0.235cm" svg:width="13.018cm" svg:height="6.154cm" draw:z-index="0"><draw:image xlink:href="Pictures/100000010000073D0000036C9DC7E9D4.png" xlink:type="simple" xlink:show="embed" xlink:actuate="onLoad" draw:mime-type="image/png"/></draw:frame></text:p>
      <text:p text:style-name="P14">Einrichten des Sensors</text:p>
      <text:list text:style-name="L5">
        <text:list-item>
          <text:p text:style-name="P15">Das CoatingSpy-Webinterface sollte nun zu sehen sein</text:p>
        </text:list-item>
        <text:list-item>
          <text:p text:style-name="P16"><text:span text:style-name="T11">saubere </text:span>Float-Glasscheibe <text:span text:style-name="T11">mit maximaler Dicke </text:span>einlegen </text:p>
        </text:list-item>
        <text:list-item>
          <text:p text:style-name="P17">in ‚Settings‘ den Range-Of-Interest so einstellen, dass sich die 10 Reflexionen der 5 LEDs innerhalb des blauen Rechtecks befinden</text:p>
        </text:list-item>
        <text:list-item>
          <text:p text:style-name="P16"><text:span text:style-name="T11">mittels ‚Cali‘ </text:span>den Sensor kalibrieren</text:p>
        </text:list-item>
        <text:list-item>
          <text:p text:style-name="P16"><text:span text:style-name="T11">durch mehrmaligem Ausführen von ‚</text:span>+‘ <text:span text:style-name="T11">bzw. </text:span>,-‘ die <text:span text:style-name="T11">tatsächliche</text:span> <text:span text:style-name="T11">Glasd</text:span>icke anpassen</text:p>
        </text:list-item>
      </text:list>
      <text:p text:style-name="P18"/>
      <text:p text:style-name="P14"><text:span text:style-name="T13">Glass-Typen</text:span> <text:span text:style-name="T13">einlernen</text:span></text:p>
      <text:p text:style-name="P19">Damit der Scanner die Glasscheiben <text:span text:style-name="T13">unterscheiden</text:span> kann, müssen diese <text:span text:style-name="T13">einmal eingelernt (gespeichert) werden</text:span>. <text:span text:style-name="T13">Dafür muss für jeden Glass-Typ eine saubere Referenzscheibe (inkl. eindeutiger ID und Bezeichnung) vorliegen.</text:span></text:p>
      <text:p text:style-name="P20">Das folgende Prozedere muss für jeden einzelnen Glass-Typ durchgeführt werden.</text:p>
      <text:p text:style-name="P20">Bei Glass-Typen (zB. beschichtet), welche je Seite eine unterschiedliche Reflexion aufweisen, ist eine beidseitige Durchführung notwendig.</text:p>
      <text:p text:style-name="P19"/>
      <text:list text:style-name="L6">
        <text:list-item>
          <text:p text:style-name="P21">Glas<text:span text:style-name="T13">scheibe</text:span> unter <text:span text:style-name="T13">den </text:span>Sensor legen </text:p>
        </text:list-item>
        <text:list-item>
          <text:p text:style-name="P22">visuelle Kontrolle des Live-Bildes hinsichtlich störender Reflexion (Etikett, Verschmutzung, etc.)</text:p>
        </text:list-item>
        <text:list-item>
          <text:p text:style-name="P23"><text:span text:style-name="T13">die Glass-Typen-Verwaltung öffnen (</text:span>‚Recipes‘<text:span text:style-name="T13">)</text:span></text:p>
        </text:list-item>
        <text:list-item>
          <text:p text:style-name="P23"><text:span text:style-name="T13">einen neuen Glass-Typ definieren (</text:span>‚Add‘<text:span text:style-name="T13">)</text:span></text:p>
        </text:list-item>
        <text:list-item>
          <text:p text:style-name="P24">die jeweiligen Scheiben-ID, Bezeichnung und gegebenenfalls Beschichtungsseite eintragen <text:span text:style-name="T14">(keine Sonderzeichen)</text:span></text:p>
        </text:list-item>
        <text:list-item>
          <text:p text:style-name="P24">Glass-Typ hinzufügen (‚Add to list‘)</text:p>
        </text:list-item>
        <text:list-item>
          <text:p text:style-name="P22">Glastypenliste speichern (‚Save‘)</text:p>
          <text:p text:style-name="P25"/>
        </text:list-item>
      </text:list>
      <text:p text:style-name="P26">Am Ende der Prozedur ist der Sensor anwendungsbereit. Eine Funktionskontrolle ist anzuraten, dazu sind die einzelnen Scheiben erneut einzulegen und die korrekte Erkennung der Scheiben zu verifizier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1:25:03.879109200</meta:creation-date>
    <dc:date>2026-06-25T11:10:09.661889500</dc:date>
    <meta:editing-duration>PT2H12M5S</meta:editing-duration>
    <meta:editing-cycles>10</meta:editing-cycles>
    <meta:generator>LibreOffice/25.8.7.1$Windows_X86_64 LibreOffice_project/39c3b7ac021cfb9f4ca681457ad36828f90e2ce7</meta:generator>
    <meta:document-statistic meta:table-count="0" meta:image-count="1" meta:object-count="0" meta:page-count="1" meta:paragraph-count="34" meta:word-count="290" meta:character-count="2294" meta:non-whitespace-character-count="2059"/>
  </office:meta>
</office:document-meta>
</file>